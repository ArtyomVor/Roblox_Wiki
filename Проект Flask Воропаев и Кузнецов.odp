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0000000B03BAB8037.png" manifest:media-type="image/png"/>
  <manifest:file-entry manifest:full-path="Pictures/100000010000012900000167CAB34D9E.png" manifest:media-type="image/png"/>
  <manifest:file-entry manifest:full-path="Pictures/10000001000003DA0000035264B5CA90.png" manifest:media-type="image/png"/>
  <manifest:file-entry manifest:full-path="Pictures/1000000100000128000002C31176DA5D.png" manifest:media-type="image/png"/>
  <manifest:file-entry manifest:full-path="Pictures/100000010000013100000260E9240A56.png" manifest:media-type="image/png"/>
  <manifest:file-entry manifest:full-path="Pictures/10000001000003F3000002DD6392F1FE.png" manifest:media-type="image/png"/>
  <manifest:file-entry manifest:full-path="Pictures/100000010000010100000217BFE86841.png" manifest:media-type="image/png"/>
  <manifest:file-entry manifest:full-path="Pictures/10000001000003DE00000376B28E2A17.png" manifest:media-type="image/png"/>
  <manifest:file-entry manifest:full-path="Pictures/10000001000007800000022F740B8ABF.png" manifest:media-type="image/png"/>
  <manifest:file-entry manifest:full-path="Pictures/10000001000001550000022EC4DCC84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rlito" svg:font-family="Carlito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212cm" svg:stroke-color="#ffc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18cm" svg:stroke-color="#4472c4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a5a5a5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5" style:family="graphic" style:parent-style-name="standard">
      <style:graphic-properties draw:stroke="solid" svg:stroke-width="0.018cm" svg:stroke-color="#ed7d31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8.7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4.7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Пусто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Два_20_объекта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solid" draw:fill-color="#a5a5a5" draw:opacity="5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15" style:family="paragraph">
      <style:text-properties style:font-name="Times New Roman"/>
    </style:style>
    <style:style style:name="P16" style:family="paragraph">
      <loext:graphic-properties draw:fill="none" draw:fill-color="#ffffff"/>
      <style:text-properties style:font-name="Times New Roman"/>
    </style:style>
    <style:style style:name="P17" style:family="paragraph">
      <style:text-properties style:font-name="Times New Roman" fo:font-size="21pt" style:font-size-asian="21pt" style:font-size-complex="21pt"/>
    </style:style>
    <style:style style:name="P18" style:family="paragraph">
      <loext:graphic-properties draw:fill="none" draw:fill-color="#ffffff"/>
      <style:text-properties style:font-name="Times New Roman" fo:font-size="21pt" style:font-size-asian="21pt" style:font-size-complex="2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21pt" style:font-size-asian="21pt" style:font-size-complex="21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8pt" fo:letter-spacing="normal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custom-shape draw:name="Прямоугольник 5" draw:style-name="gr1" draw:text-style-name="P2" draw:layer="layout" svg:width="19.407cm" svg:height="2.965cm" svg:x="2.593cm" svg:y="6.18cm">
          <text:p text:style-name="P1"><text:span text:style-name="T1">Википедия по плейсу в роблоксе</text:span></text:p>
          <text:p text:style-name="P1"><text:span text:style-name="T1">Jujutsu Shenanig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авая фигурная скобка 8" draw:style-name="gr2" draw:text-style-name="P3" draw:layer="layout" svg:width="1.583cm" svg:height="3.218cm" svg:x="21.492cm" svg:y="6.374cm">
          <text:p/>
          <draw:enhanced-geometry draw:mirror-horizontal="false" draw:mirror-vertical="false" svg:viewBox="0 0 0 0" draw:text-areas="0 ?f15 ?f14 ?f16" draw:type="ooxml-rightBrace" draw:modifiers="47692 49054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Правая фигурная скобка 9" draw:style-name="gr2" draw:text-style-name="P3" draw:layer="layout" svg:width="1.583cm" svg:height="3.218cm" draw:transform="rotate (-3.14159265358979) translate (3.668cm 9.593cm)">
          <text:p/>
          <draw:enhanced-geometry draw:mirror-horizontal="false" draw:mirror-vertical="false" svg:viewBox="0 0 0 0" draw:text-areas="0 ?f15 ?f14 ?f16" draw:type="ooxml-rightBrace" draw:modifiers="47692 53121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Часть круга 11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12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14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TextBox 15" draw:style-name="gr6" draw:text-style-name="P8" draw:layer="layout" svg:width="4.933cm" svg:height="1.775cm" svg:x="1.201cm" svg:y="16.172cm">
          <text:p text:style-name="P7"><text:span text:style-name="T2">Подготовил:</text:span></text:p>
          <text:p text:style-name="P7"><text:span text:style-name="T2">Воропаев Артё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custom-shape draw:name="Часть круга 4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5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6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7" draw:style-name="gr8" draw:text-style-name="P11" draw:layer="layout" svg:width="21.964cm" svg:height="2.287cm" svg:x="5.951cm" svg:y="1.132cm">
          <text:p text:style-name="P10"><text:span text:style-name="T3">Архите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31.007cm" svg:height="5.5cm" svg:x="1.5cm" svg:y="4cm">
          <draw:image xlink:href="Pictures/10000001000003E0000000B03BAB8037.png" xlink:type="simple" xlink:show="embed" xlink:actuate="onLoad" draw:mime-type="image/png">
            <text:p/>
          </draw:image>
        </draw:frame>
        <draw:frame draw:style-name="gr9" draw:text-style-name="P12" draw:layer="layout" svg:width="7.032cm" svg:height="8.5cm" svg:x="0.5cm" svg:y="10cm">
          <draw:image xlink:href="Pictures/100000010000012900000167CAB34D9E.png" xlink:type="simple" xlink:show="embed" xlink:actuate="onLoad" draw:mime-type="image/png">
            <text:p/>
          </draw:image>
        </draw:frame>
        <draw:frame draw:style-name="gr9" draw:text-style-name="P12" draw:layer="layout" svg:width="4.148cm" svg:height="9.91cm" svg:x="8cm" svg:y="9.14cm">
          <draw:image xlink:href="Pictures/1000000100000128000002C31176DA5D.png" xlink:type="simple" xlink:show="embed" xlink:actuate="onLoad" draw:mime-type="image/png">
            <text:p/>
          </draw:image>
        </draw:frame>
        <draw:frame draw:style-name="gr9" draw:text-style-name="P12" draw:layer="layout" svg:width="4.558cm" svg:height="9.087cm" svg:x="12.442cm" svg:y="9.413cm">
          <draw:image xlink:href="Pictures/100000010000013100000260E9240A56.png" xlink:type="simple" xlink:show="embed" xlink:actuate="onLoad" draw:mime-type="image/png">
            <text:p/>
          </draw:image>
        </draw:frame>
        <draw:frame draw:style-name="gr9" draw:text-style-name="P12" draw:layer="layout" svg:width="5.118cm" svg:height="10.656cm" svg:x="16.5cm" svg:y="8.5cm">
          <draw:image xlink:href="Pictures/100000010000010100000217BFE86841.png" xlink:type="simple" xlink:show="embed" xlink:actuate="onLoad" draw:mime-type="image/png">
            <text:p/>
          </draw:image>
        </draw:frame>
        <draw:frame draw:style-name="gr10" draw:text-style-name="P14" draw:layer="layout" svg:width="10cm" svg:height="9cm" svg:x="20cm" svg:y="9.5cm">
          <draw:text-box>
            <text:p text:style-name="P13"><text:span text:style-name="T4">Навигация по сайту</text:span></text:p>
            <text:p text:style-name="P13"><text:span text:style-name="T4"/></text:p>
            <text:p text:style-name="P13"><text:span text:style-name="T5">Содержимое страницы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draw:custom-shape draw:name="Часть круга 4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5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6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7" draw:style-name="gr11" draw:text-style-name="P11" draw:layer="layout" svg:width="21.964cm" svg:height="2.287cm" svg:x="5.822cm" svg:y="0.425cm">
          <text:p text:style-name="P10"><text:span text:style-name="T3">Реализованные страниц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5.629cm" svg:height="13.987cm" svg:x="0.371cm" svg:y="3cm">
          <draw:image xlink:href="Pictures/10000001000003DE00000376B28E2A17.png" xlink:type="simple" xlink:show="embed" xlink:actuate="onLoad" draw:mime-type="image/png">
            <text:p/>
          </draw:image>
        </draw:frame>
        <draw:frame draw:style-name="gr9" draw:text-style-name="P12" draw:layer="layout" svg:width="16.552cm" svg:height="12cm" svg:x="16.448cm" svg:y="3cm">
          <draw:image xlink:href="Pictures/10000001000003F3000002DD6392F1FE.png" xlink:type="simple" xlink:show="embed" xlink:actuate="onLoad" draw:mime-type="image/png">
            <text:p/>
          </draw:image>
        </draw:frame>
        <draw:frame draw:style-name="gr12" draw:text-style-name="P16" draw:layer="layout" svg:width="15cm" svg:height="0.954cm" svg:x="1cm" svg:y="18cm">
          <draw:text-box>
            <text:p text:style-name="P15"><text:span text:style-name="T6">About</text:span></text:p>
          </draw:text-box>
        </draw:frame>
        <draw:frame draw:style-name="gr12" draw:text-style-name="P16" draw:layer="layout" svg:width="15cm" svg:height="0.954cm" svg:x="17cm" svg:y="16cm">
          <draw:text-box>
            <text:p text:style-name="P15"><text:span text:style-name="T6">Cash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устой_20_слайд">
        <draw:custom-shape draw:name="Часть круга 4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5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6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2" draw:style-name="gr13" draw:text-style-name="P11" draw:layer="layout" svg:width="21.964cm" svg:height="2.287cm" svg:x="5.822cm" svg:y="0.426cm">
          <text:p text:style-name="P10"><text:span text:style-name="T3">Реализованные страниц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7.094cm" svg:height="14.736cm" svg:x="0.5cm" svg:y="3.764cm">
          <draw:image xlink:href="Pictures/10000001000003DA0000035264B5CA90.png" xlink:type="simple" xlink:show="embed" xlink:actuate="onLoad" draw:mime-type="image/png">
            <text:p/>
          </draw:image>
        </draw:frame>
        <draw:frame draw:style-name="gr14" draw:text-style-name="P18" draw:layer="layout" svg:width="15cm" svg:height="3cm" svg:x="18cm" svg:y="4.5cm">
          <draw:text-box>
            <text:p text:style-name="P17"><text:span text:style-name="T7">Шаблон для 14 из 21 персонажей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Два_20_объекта" presentation:presentation-page-layout-name="AL3T3">
        <draw:custom-shape draw:name="Часть круга 4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5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6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7" draw:style-name="gr15" draw:text-style-name="P11" draw:layer="layout" svg:width="21.964cm" svg:height="2.287cm" svg:x="5.951cm" svg:y="0.261cm">
          <text:p text:style-name="P10"><text:span text:style-name="T8">База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32.366cm" svg:height="9.417cm" svg:x="0.634cm" svg:y="3.647cm">
          <draw:image xlink:href="Pictures/10000001000007800000022F740B8A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устой_20_слайд">
        <draw:custom-shape draw:name="Часть круга 1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олилиния: фигура 2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3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4" draw:style-name="gr16" draw:text-style-name="P11" draw:layer="layout" svg:width="11.5cm" svg:height="2.287cm" svg:x="1cm" svg:y="0.261cm">
          <text:p text:style-name="P10"><text:span text:style-name="T8">Наконец — то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9.522cm" svg:height="15.582cm" svg:x="0.978cm" svg:y="2.682cm">
          <draw:image xlink:href="Pictures/10000001000001550000022EC4DCC840.png" xlink:type="simple" xlink:show="embed" xlink:actuate="onLoad" draw:mime-type="image/png">
            <text:p/>
          </draw:image>
        </draw:frame>
        <draw:custom-shape draw:name="Прямоугольник 3" draw:style-name="gr17" draw:text-style-name="P11" draw:layer="layout" svg:width="20cm" svg:height="2.287cm" svg:x="13cm" svg:y="0.262cm">
          <text:p text:style-name="P10"><text:span text:style-name="T8">Что предстоит доработ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8" draw:layer="layout" svg:width="19cm" svg:height="15cm" svg:x="13cm" svg:y="3cm">
          <draw:text-box>
            <text:p text:style-name="P17"><text:span text:style-name="T7">Добавить авторизацию и хранение файлов пользователей</text:span></text:p>
            <text:p text:style-name="P17"><text:span text:style-name="T7"/></text:p>
            <text:p text:style-name="P17"><text:span text:style-name="T7">Дополнить базу данных</text:span></text:p>
            <text:p text:style-name="P17"><text:span text:style-name="T7"/></text:p>
            <text:p text:style-name="P17"><text:span text:style-name="T7">Доделать недостающие страницы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устой_20_слайд">
        <draw:custom-shape draw:name="Полилиния: фигура 3" draw:style-name="gr4" draw:text-style-name="P5" draw:layer="layout" svg:width="10.095cm" svg:height="19.065cm" svg:x="23.76cm" svg:y="-0.032cm">
          <text:p/>
          <draw:enhanced-geometry draw:mirror-horizontal="false" draw:mirror-vertical="false" svg:viewBox="0 0 0 0" draw:glue-points="?f0 ?f1 ?f2 ?f3 ?f4 ?f5 ?f6 ?f7" drawooo:sub-view-size="3634451 6863788" draw:text-areas="0 0 ?f8 ?f9" draw:type="ooxml-non-primitive" draw:enhanced-path="M 0 23150 L 3634451 6863788 C 3630593 4575859 3626734 2287929 3622876 0 L 0 23150 Z N">
            <draw:equation draw:name="f0" draw:formula="0*logwidth/3634451"/>
            <draw:equation draw:name="f1" draw:formula="23150*logheight/6863788"/>
            <draw:equation draw:name="f2" draw:formula="3634451*logwidth/3634451"/>
            <draw:equation draw:name="f3" draw:formula="6863788*logheight/6863788"/>
            <draw:equation draw:name="f4" draw:formula="3622876*logwidth/3634451"/>
            <draw:equation draw:name="f5" draw:formula="0*logheight/6863788"/>
            <draw:equation draw:name="f6" draw:formula="0*logwidth/3634451"/>
            <draw:equation draw:name="f7" draw:formula="23150*logheight/6863788"/>
            <draw:equation draw:name="f8" draw:formula="logwidth"/>
            <draw:equation draw:name="f9" draw:formula="logheight"/>
          </draw:enhanced-geometry>
        </draw:custom-shape>
        <draw:custom-shape draw:name="Часть круга 2" draw:style-name="gr3" draw:text-style-name="P4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0782509 14516282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Часть круга 4" draw:style-name="gr5" draw:text-style-name="P6" draw:layer="layout" svg:width="17.503cm" svg:height="15.397cm" svg:x="25.115cm" svg:y="11.351cm">
          <text:p/>
          <draw:enhanced-geometry draw:mirror-horizontal="false" draw:mirror-vertical="false" svg:viewBox="0 0 0 0" draw:glue-points="?f12 ?f13 ?f11 ?f12 0 ?f13 ?f11 0" draw:text-areas="?f23 ?f24 ?f25 ?f26" draw:type="ooxml-pie" draw:modifiers="14526194 16191151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 draw:handle-position-x="?f12" draw:handle-position-y="?f14"/>
            <draw:handle draw:handle-position="?f19 ?f20" draw:handle-position-x="?f19" draw:handle-position-y="?f20"/>
          </draw:enhanced-geometry>
        </draw:custom-shape>
        <draw:custom-shape draw:name="Прямоугольник 1" draw:style-name="gr19" draw:text-style-name="P11" draw:layer="layout" svg:width="33.867cm" svg:height="3.303cm" svg:x="0cm" svg:y="7.697cm">
          <text:p text:style-name="P10"><text:span text:style-name="T9">Спасибо за внимание =)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rlito" svg:font-family="Carlito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XO Oriel" svg:font-family="'XO Oriel'" style:font-family-generic="roman" style:font-pitch="variable"/>
  </office:font-face-decls>
  <office:styles>
    <draw:gradient draw:name="Gradient_20_1" draw:display-name="Gradient 1" draw:style="linear" draw:start-color="#6082ca" draw:end-color="#2f61ba" draw:start-intensity="100%" draw:end-intensity="100%" draw:angle="0deg" draw:border="0%">
      <loext:gradient-stop svg:offset="0" loext:color-type="rgb" loext:color-value="#6082ca"/>
      <loext:gradient-stop svg:offset="0.5" loext:color-type="rgb" loext:color-value="#3d6fc9"/>
      <loext:gradient-stop svg:offset="1" loext:color-type="rgb" loext:color-value="#2f61ba"/>
    </draw:gradient>
    <draw:gradient draw:name="Gradient_20_2" draw:display-name="Gradient 2" draw:style="linear" draw:start-color="#f08c56" draw:end-color="#e46b19" draw:start-intensity="100%" draw:end-intensity="100%" draw:angle="0deg" draw:border="0%">
      <loext:gradient-stop svg:offset="0" loext:color-type="rgb" loext:color-value="#f08c56"/>
      <loext:gradient-stop svg:offset="0.5" loext:color-type="rgb" loext:color-value="#f57a27"/>
      <loext:gradient-stop svg:offset="1" loext:color-type="rgb" loext:color-value="#e46b19"/>
    </draw:gradient>
    <draw:gradient draw:name="Gradient_20_3" draw:display-name="Gradient 3" draw:style="linear" draw:start-color="#ffc54b" draw:end-color="#e2aa00" draw:start-intensity="100%" draw:end-intensity="100%" draw:angle="0deg" draw:border="0%">
      <loext:gradient-stop svg:offset="0" loext:color-type="rgb" loext:color-value="#ffc54b"/>
      <loext:gradient-stop svg:offset="0.5" loext:color-type="rgb" loext:color-value="#ffbf00"/>
      <loext:gradient-stop svg:offset="1" loext:color-type="rgb" loext:color-value="#e2aa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Текст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Объект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Артем Сундуков</meta:initial-creator>
    <meta:editing-cycles>7</meta:editing-cycles>
    <meta:creation-date>2025-11-07T15:57:33</meta:creation-date>
    <dc:date>2026-05-14T00:55:07.592043600</dc:date>
    <meta:editing-duration>PT1H27M15S</meta:editing-duration>
    <meta:generator>LibreOffice/25.8.6.2$Windows_X86_64 LibreOffice_project/b4b39682cd9868fa725bc664aff94278d315bd04</meta:generator>
    <meta:document-statistic meta:object-count="197"/>
    <meta:user-defined meta:name="AppVersion">16.0000</meta:user-defined>
    <meta:user-defined meta:name="PresentationFormat">Широкоэкранный</meta:user-defined>
    <meta:user-defined meta:name="Slides" meta:value-type="float">11</meta:user-defined>
  </office:meta>
</office:document-meta>
</file>